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f172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8fafc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891b2" draw:fill="solid" draw:fill-color="#0891b2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f59e0b" draw:fill="solid" draw:fill-color="#f59e0b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" style:family="graphic" style:parent-style-name="standard">
      <style:graphic-properties draw:stroke="solid" svg:stroke-width="0.035cm" svg:stroke-color="#e2e8f0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>
      <style:graphic-properties draw:stroke="solid" svg:stroke-width="0.035cm" svg:stroke-color="#dc2626" draw:fill="solid" draw:fill-color="#dc2626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28" style:family="graphic" style:parent-style-name="standard">
      <style:graphic-properties draw:stroke="solid" svg:stroke-width="0.071cm" svg:stroke-color="#0891b2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>
      <style:graphic-properties draw:stroke="solid" svg:stroke-width="0.035cm" svg:stroke-color="#334155" draw:fill="solid" draw:fill-color="#1e293b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>
      <style:graphic-properties loext:decorative="false"/>
    </style:style>
    <style:style style:name="gr5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>
      <style:graphic-properties draw:stroke="solid" svg:stroke-width="0.035cm" svg:stroke-color="#334155" draw:fill="solid" draw:fill-color="#1e293b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0" style:family="graphic" style:parent-style-name="standard">
      <style:graphic-properties draw:stroke="solid" svg:stroke-width="0.035cm" svg:stroke-color="#ea580c" draw:fill="solid" draw:fill-color="#ea580c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7" style:family="graphic" style:parent-style-name="standard">
      <style:graphic-properties draw:stroke="solid" svg:stroke-width="0.035cm" svg:stroke-color="#0f172a" draw:fill="solid" draw:fill-color="#0f172a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co1" style:family="table-column">
      <style:table-column-properties style:column-width="2.794cm" style:use-optimal-column-width="false"/>
    </style:style>
    <style:style style:name="co2" style:family="table-column">
      <style:table-column-properties style:column-width="2.54cm" style:use-optimal-column-width="false"/>
    </style:style>
    <style:style style:name="co3" style:family="table-column">
      <style:table-column-properties style:column-width="1.905cm" style:use-optimal-column-width="false"/>
    </style:style>
    <style:style style:name="co4" style:family="table-column">
      <style:table-column-properties style:column-width="2.286cm" style:use-optimal-column-width="false"/>
    </style:style>
    <style:style style:name="co5" style:family="table-column">
      <style:table-column-properties style:column-width="2.159cm" style:use-optimal-column-width="false"/>
    </style:style>
    <style:style style:name="co6" style:family="table-column">
      <style:table-column-properties style:column-width="2.032cm" style:use-optimal-column-width="false"/>
    </style:style>
    <style:style style:name="ro1" style:family="table-row">
      <style:table-row-properties style:row-height="0.622cm" style:use-optimal-row-height="false"/>
    </style:style>
    <style:style style:name="ro2" style:family="table-row">
      <style:table-row-properties style:row-height="0.598cm" style:use-optimal-row-height="false"/>
    </style:style>
    <style:style style:name="ce1" style:family="table-cell">
      <loext:graphic-properties draw:fill="solid" draw:fill-color="#0f172a" draw:textarea-vertical-align="middle" fo:padding-top="0.127cm" fo:padding-bottom="0.127cm" fo:padding-left="0.254cm" fo:padding-right="0.254cm"/>
      <style:paragraph-properties fo:border="0.26pt solid #334155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" style:family="table-cell">
      <loext:graphic-properties draw:fill="solid" draw:fill-color="#0f172a" draw:textarea-vertical-align="middle" fo:padding-top="0.127cm" fo:padding-bottom="0.127cm" fo:padding-left="0.254cm" fo:padding-right="0.254cm"/>
      <style:paragraph-properties fo:border="0.26pt solid #334155" style:font-independent-line-spacing="true"/>
    </style:style>
    <style:style style:name="ce3" style:family="table-cell">
      <loext:graphic-properties draw:fill="solid" draw:fill-color="#1e293b" draw:textarea-vertical-align="middle" fo:padding-top="0.127cm" fo:padding-bottom="0.127cm" fo:padding-left="0.254cm" fo:padding-right="0.254cm"/>
      <style:paragraph-properties fo:border="0.26pt solid #334155" style:font-independent-line-spacing="true"/>
    </style:style>
    <style:style style:name="ce4" style:family="table-cell">
      <loext:graphic-properties draw:fill="solid" draw:fill-color="#1c3a50" draw:textarea-vertical-align="middle" fo:padding-top="0.127cm" fo:padding-bottom="0.127cm" fo:padding-left="0.254cm" fo:padding-right="0.254cm"/>
      <style:paragraph-properties fo:border="0.26pt solid #334155" style:font-independent-line-spacing="true"/>
    </style:style>
    <style:style style:name="ce5" style:family="table-cell">
      <loext:graphic-properties draw:fill="solid" draw:fill-color="#1c3a1c" draw:textarea-vertical-align="middle" fo:padding-top="0.127cm" fo:padding-bottom="0.127cm" fo:padding-left="0.254cm" fo:padding-right="0.254cm"/>
      <style:paragraph-properties fo:border="0.26pt solid #334155" style:font-independent-line-spacing="true"/>
    </style:style>
    <style:style style:name="P1" style:family="paragraph">
      <loext:graphic-properties draw:fill="solid" draw:fill-color="#0891b2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solid" draw:fill-color="#f59e0b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left" style:font-independent-line-spacing="true"/>
      <style:text-properties fo:font-size="18pt" style:font-size-asian="14pt" style:font-size-complex="14pt"/>
    </style:style>
    <style:style style:name="P8" style:family="paragraph">
      <loext:graphic-properties draw:fill="solid" draw:fill-color="#ffffff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9" style:family="paragraph">
      <loext:graphic-properties draw:fill="solid" draw:fill-color="#dc2626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text-align="left"/>
      <style:text-properties fo:font-size="18pt"/>
    </style:style>
    <style:style style:name="P11" style:family="paragraph">
      <loext:graphic-properties draw:fill="none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solid" draw:fill-color="#1e293b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5" style:family="paragraph">
      <loext:graphic-properties draw:fill="solid" draw:fill-color="#ea580c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6" style:family="paragraph">
      <loext:graphic-properties draw:fill="solid" draw:fill-color="#0f172a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0891b2" loext:opacity="100%" style:text-outline="false" style:text-line-through-style="none" style:text-line-through-type="none" style:text-position="0% 100%" style:font-name="Calibri" fo:font-size="10pt" fo:letter-spacing="0.106cm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variant="normal" fo:text-transform="none" fo:color="#f8fafc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8pt" fo:letter-spacing="normal" fo:language="en" fo:country="US" fo:font-style="normal" style:text-underline-style="none" fo:font-weight="normal" fo:background-color="transparent" style:font-name-asian="+mn-ea" style:font-size-asian="18pt" style:font-style-asian="normal" style:font-weight-asian="normal" style:font-name-complex="+mn-cs" style:font-size-complex="1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891b2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dc2626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5pt" fo:letter-spacing="normal" fo:language="en" fo:country="US" fo:font-style="italic" style:text-underline-style="none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T16" style:family="text">
      <style:text-properties fo:font-variant="normal" fo:text-transform="none" fo:color="#0891b2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alibri" fo:font-size="10pt" fo:letter-spacing="0.106cm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21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alibri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22" style:family="text">
      <style:text-properties fo:font-variant="normal" fo:text-transform="none" fo:color="#dc2626" loext:opacity="100%" style:text-outline="false" style:text-line-through-style="none" style:text-line-through-type="none" style:text-position="0% 100%" style:font-name="Calibri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23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25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26" style:family="text">
      <style:text-properties fo:font-variant="normal" fo:text-transform="none" fo:color="#16a34a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27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dc2626" loext:opacity="100%" style:text-outline="false" style:text-line-through-style="none" style:text-line-through-type="none" style:text-position="0% 100%" style:font-name="Calibri" fo:font-size="10pt" fo:letter-spacing="0.106cm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fo:font-variant="normal" fo:text-transform="none" fo:color="#dc2626" loext:opacity="100%" style:text-outline="false" style:text-line-through-style="none" style:text-line-through-type="none" style:text-position="0% 100%" style:font-name="Calibri" fo:font-size="52pt" fo:letter-spacing="normal" fo:language="en" fo:country="US" fo:font-style="normal" style:text-underline-style="none" fo:font-weight="bold" fo:background-color="transparent" style:font-size-asian="52pt" style:font-style-asian="normal" style:font-weight-asian="bold" style:font-size-complex="52pt" style:font-style-complex="normal" style:font-weight-complex="bold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34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891b2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37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38" style:family="text">
      <style:text-properties fo:font-variant="normal" fo:text-transform="none" fo:color="#dc2626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39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891b2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94a3b8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8fafc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f172a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dc2626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16a34a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25.399cm" svg:height="0.17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3" draw:layer="layout" svg:width="22.351cm" svg:height="0.888cm" svg:x="1.524cm" svg:y="1.397cm">
          <text:p text:style-name="P2"><text:span text:style-name="T1">ATLIQ MEDIA <text:s/>· <text:s/>EDITORIAL PIT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3" draw:layer="layout" svg:width="22.351cm" svg:height="3.301cm" svg:x="1.524cm" svg:y="2.794cm">
          <text:p text:style-name="P2"><text:span text:style-name="T2">Decoding Tamil Nadu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3" draw:layer="layout" svg:width="20.319cm" svg:height="1.396cm" svg:x="1.524cm" svg:y="6.223cm">
          <text:p text:style-name="P2"><text:span text:style-name="T3">Three data stories for your one-hour sh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5" draw:text-style-name="P4" draw:layer="layout" svg:width="3.809cm" svg:height="0.126cm" svg:x="1.524cm" svg:y="8.0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3" draw:layer="layout" svg:width="20.319cm" svg:height="0.964cm" svg:x="1.524cm" svg:y="8.763cm">
          <text:p text:style-name="P2"><text:span text:style-name="T4">01 — The Map Redraw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3" draw:layer="layout" svg:width="20.319cm" svg:height="0.964cm" svg:x="1.524cm" svg:y="9.83cm">
          <text:p text:style-name="P2"><text:span text:style-name="T4">02 — The Great Fli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" draw:text-style-name="P3" draw:layer="layout" svg:width="20.319cm" svg:height="0.964cm" svg:x="1.524cm" svg:y="10.897cm">
          <text:p text:style-name="P2"><text:span text:style-name="T4">03 — Factual phras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" draw:text-style-name="P3" draw:layer="layout" svg:width="22.859cm" svg:height="0.71cm" svg:x="1.524cm" svg:y="13.335cm">
          <text:p text:style-name="P2"><text:span text:style-name="T5">Data Source: Election Commission of India <text:s/>· <text:s/>ECI Results Portal 2026 <text:s/>· <text:s/>ECI Statistical Reports 202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0cm" svg:height="0cm" svg:x="0cm" svg:y="0cm" draw:page-number="1" presentation:class="page"/>
          <draw:frame draw:name="Notes Placeholder 2" presentation:style-name="pr1" draw:text-style-name="P5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7" draw:layer="layout" svg:width="0cm" svg:height="0cm" svg:x="0cm" svg:y="0cm" presentation:class="page-number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DEFAULT">
        <draw:custom-shape draw:name="Text 0" draw:style-name="gr11" draw:text-style-name="P3" draw:layer="layout" svg:width="22.351cm" svg:height="1.777cm" svg:x="1.524cm" svg:y="0.889cm">
          <text:p text:style-name="P2"><text:span text:style-name="T7">What We're Pitching Toda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" draw:text-style-name="P3" draw:layer="layout" svg:width="21.589cm" svg:height="1.142cm" svg:x="1.524cm" svg:y="2.794cm">
          <text:p text:style-name="P2"><text:span text:style-name="T8">Three self-contained stories. Each has a clear chart. Each works as a show segmen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" draw:text-style-name="P8" draw:layer="layout" svg:width="7.111cm" svg:height="8.127cm" svg:x="1.27cm" svg:y="4.44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7.111cm" svg:height="0.253cm" svg:x="1.27cm" svg:y="4.44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" draw:text-style-name="P3" draw:layer="layout" svg:width="6.095cm" svg:height="1.269cm" svg:x="1.778cm" svg:y="5.08cm">
          <text:p text:style-name="P2"><text:span text:style-name="T9">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5" draw:text-style-name="P3" draw:layer="layout" svg:width="6.222cm" svg:height="1.396cm" svg:x="1.778cm" svg:y="6.401cm">
          <text:p text:style-name="P2"><text:span text:style-name="T10">The Map Redraw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6" draw:text-style-name="P3" draw:layer="layout" svg:width="6.222cm" svg:height="3.936cm" svg:x="1.778cm" svg:y="8.001cm">
          <text:p text:style-name="P2"><text:span text:style-name="T11">How the regional seat map changed across all 6 regions of Tamil Nadu — 2021 vs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3" draw:text-style-name="P8" draw:layer="layout" svg:width="7.111cm" svg:height="8.127cm" svg:x="9.144cm" svg:y="4.44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4" draw:layer="layout" svg:width="7.111cm" svg:height="0.253cm" svg:x="9.144cm" svg:y="4.44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7" draw:text-style-name="P3" draw:layer="layout" svg:width="6.095cm" svg:height="1.269cm" svg:x="9.652cm" svg:y="5.08cm">
          <text:p text:style-name="P2"><text:span text:style-name="T12">0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8" draw:text-style-name="P3" draw:layer="layout" svg:width="6.222cm" svg:height="1.396cm" svg:x="9.652cm" svg:y="6.401cm">
          <text:p text:style-name="P2"><text:span text:style-name="T10">The Great Fli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9" draw:text-style-name="P3" draw:layer="layout" svg:width="6.222cm" svg:height="3.936cm" svg:x="9.652cm" svg:y="8.001cm">
          <text:p text:style-name="P2"><text:span text:style-name="T11">70% of seats changed hands — who gained, who lost, and the transition matrix shows every shif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3" draw:text-style-name="P8" draw:layer="layout" svg:width="7.111cm" svg:height="8.127cm" svg:x="17.018cm" svg:y="4.44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0" draw:text-style-name="P9" draw:layer="layout" svg:width="7.111cm" svg:height="0.253cm" svg:x="17.018cm" svg:y="4.44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1" draw:text-style-name="P3" draw:layer="layout" svg:width="6.095cm" svg:height="1.269cm" svg:x="17.526cm" svg:y="5.08cm">
          <text:p text:style-name="P2"><text:span text:style-name="T13">0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2" draw:text-style-name="P3" draw:layer="layout" svg:width="6.222cm" svg:height="1.396cm" svg:x="17.526cm" svg:y="6.401cm">
          <text:p text:style-name="P2"><text:span text:style-name="T10">Margin of Victo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3" draw:text-style-name="P3" draw:layer="layout" svg:width="6.222cm" svg:height="3.936cm" svg:x="17.526cm" svg:y="8.001cm">
          <text:p text:style-name="P2"><text:span text:style-name="T11">Average margin 8.3% in flipped seats — how were margins distributed across constituencies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0cm" svg:height="0cm" svg:x="0cm" svg:y="0cm" draw:page-number="2" presentation:class="page"/>
          <draw:frame draw:name="Notes Placeholder 2" presentation:style-name="pr3" draw:text-style-name="P5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7" draw:layer="layout" svg:width="0cm" svg:height="0cm" svg:x="0cm" svg:y="0cm" presentation:class="page-number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1" draw:text-style-name="P1" draw:layer="layout" svg:width="25.399cm" svg:height="0.17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4" draw:text-style-name="P3" draw:layer="layout" svg:width="10.159cm" svg:height="0.761cm" svg:x="1.524cm" svg:y="0.559cm">
          <text:p text:style-name="P2"><text:span text:style-name="T1">STORY 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5" draw:text-style-name="P3" draw:layer="layout" svg:width="22.859cm" svg:height="2.285cm" svg:x="1.524cm" svg:y="1.473cm">
          <text:p text:style-name="P2"><text:span text:style-name="T14">The Map Redraw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6" draw:text-style-name="P3" draw:layer="layout" svg:width="21.589cm" svg:height="1.142cm" svg:x="1.524cm" svg:y="3.861cm">
          <text:p text:style-name="P2"><text:span text:style-name="T15">How did the regional balance of power shift between 2021 and 2026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0" draw:style-name="gr27" draw:text-style-name="P10" draw:layer="layout" svg:width="10.921cm" svg:height="7.873cm" svg:x="1.27cm" svg:y="5.4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hart 1" draw:style-name="gr27" draw:text-style-name="P10" draw:layer="layout" svg:width="10.921cm" svg:height="7.873cm" svg:x="13.208cm" svg:y="5.4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name="Shape 4" draw:style-name="gr28" draw:text-style-name="P11" draw:layer="layout" svg:x1="12.395cm" svg:y1="9.398cm" svg:x2="13.03cm" svg:y2="9.399cm">
          <text:p/>
        </draw:line>
        <draw:custom-shape draw:name="Text 5" draw:style-name="gr29" draw:text-style-name="P13" draw:layer="layout" svg:width="1.015cm" svg:height="1.015cm" svg:x="12.319cm" svg:y="8.941cm">
          <text:p text:style-name="P12"><text:span text:style-name="T16">→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0cm" svg:height="0cm" svg:x="0cm" svg:y="0cm" draw:page-number="3" presentation:class="page"/>
          <draw:frame draw:name="Notes Placeholder 2" presentation:style-name="pr4" draw:text-style-name="P5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7" draw:layer="layout" svg:width="0cm" svg:height="0cm" svg:x="0cm" svg:y="0cm" presentation:class="page-number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DEFAULT">
        <draw:custom-shape draw:name="Text 0" draw:style-name="gr30" draw:text-style-name="P3" draw:layer="layout" svg:width="20.319cm" svg:height="0.761cm" svg:x="1.524cm" svg:y="0.711cm">
          <text:p text:style-name="P2"><text:span text:style-name="T1">STORY 01 — KEY FIND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" draw:text-style-name="P3" draw:layer="layout" svg:width="22.351cm" svg:height="2.158cm" svg:x="1.524cm" svg:y="1.651cm">
          <text:p text:style-name="P2"><text:span text:style-name="T17">DMK led 5 of 6 regions in 2021. In 2026, TVK leads 5 of 6 region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" draw:text-style-name="P8" draw:layer="layout" svg:width="11.175cm" svg:height="2.539cm" svg:x="1.27cm" svg:y="4.19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77cm" svg:height="2.539cm" svg:x="1.27cm" svg:y="4.19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2" draw:text-style-name="P3" draw:layer="layout" svg:width="10.413cm" svg:height="0.964cm" svg:x="1.727cm" svg:y="4.445cm">
          <text:p text:style-name="P2"><text:span text:style-name="T18">Centr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3" draw:text-style-name="P3" draw:layer="layout" svg:width="10.413cm" svg:height="0.964cm" svg:x="1.727cm" svg:y="5.512cm">
          <text:p text:style-name="P2"><text:span text:style-name="T11">2021: DMK 21 seats → 2026: TVK 12, AIADMK 15, DMK 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3" draw:text-style-name="P8" draw:layer="layout" svg:width="11.175cm" svg:height="2.539cm" svg:x="1.27cm" svg:y="7.2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0.177cm" svg:height="2.539cm" svg:x="1.27cm" svg:y="7.2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4" draw:text-style-name="P3" draw:layer="layout" svg:width="10.413cm" svg:height="0.964cm" svg:x="1.727cm" svg:y="7.493cm">
          <text:p text:style-name="P2"><text:span text:style-name="T18">Chennai Metr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5" draw:text-style-name="P3" draw:layer="layout" svg:width="10.413cm" svg:height="0.964cm" svg:x="1.727cm" svg:y="8.56cm">
          <text:p text:style-name="P2"><text:span text:style-name="T11">2021: DMK 29 seats → 2026: TVK 29, DMK 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3" draw:text-style-name="P8" draw:layer="layout" svg:width="11.175cm" svg:height="2.539cm" svg:x="1.27cm" svg:y="10.2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" draw:text-style-name="P1" draw:layer="layout" svg:width="0.177cm" svg:height="2.539cm" svg:x="1.27cm" svg:y="10.2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6" draw:text-style-name="P3" draw:layer="layout" svg:width="10.413cm" svg:height="0.964cm" svg:x="1.727cm" svg:y="10.541cm">
          <text:p text:style-name="P2"><text:span text:style-name="T18">Del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7" draw:text-style-name="P3" draw:layer="layout" svg:width="10.413cm" svg:height="0.964cm" svg:x="1.727cm" svg:y="11.608cm">
          <text:p text:style-name="P2"><text:span text:style-name="T11">2021: DMK 23 seats → 2026: DMK 14, TVK 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3" draw:text-style-name="P8" draw:layer="layout" svg:width="11.175cm" svg:height="2.539cm" svg:x="13.462cm" svg:y="4.19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0.177cm" svg:height="2.539cm" svg:x="13.462cm" svg:y="4.19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8" draw:text-style-name="P3" draw:layer="layout" svg:width="10.413cm" svg:height="0.964cm" svg:x="13.919cm" svg:y="4.445cm">
          <text:p text:style-name="P2"><text:span text:style-name="T18">Kong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9" draw:text-style-name="P3" draw:layer="layout" svg:width="10.413cm" svg:height="0.964cm" svg:x="13.919cm" svg:y="5.512cm">
          <text:p text:style-name="P2"><text:span text:style-name="T11">2021: AIADMK 19 seats → 2026: TVK 16, DMK 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3" draw:text-style-name="P8" draw:layer="layout" svg:width="11.175cm" svg:height="2.539cm" svg:x="13.462cm" svg:y="7.2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" draw:text-style-name="P1" draw:layer="layout" svg:width="0.177cm" svg:height="2.539cm" svg:x="13.462cm" svg:y="7.2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0" draw:text-style-name="P3" draw:layer="layout" svg:width="10.413cm" svg:height="0.964cm" svg:x="13.919cm" svg:y="7.493cm">
          <text:p text:style-name="P2"><text:span text:style-name="T18">Nort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1" draw:text-style-name="P3" draw:layer="layout" svg:width="10.413cm" svg:height="0.964cm" svg:x="13.919cm" svg:y="8.56cm">
          <text:p text:style-name="P2"><text:span text:style-name="T11">2021: DMK 19 seats → 2026: TVK 15, AIADMK 15, DMK 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3" draw:text-style-name="P8" draw:layer="layout" svg:width="11.175cm" svg:height="2.539cm" svg:x="13.462cm" svg:y="10.2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" draw:text-style-name="P1" draw:layer="layout" svg:width="0.177cm" svg:height="2.539cm" svg:x="13.462cm" svg:y="10.2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42" draw:text-style-name="P3" draw:layer="layout" svg:width="10.413cm" svg:height="0.964cm" svg:x="13.919cm" svg:y="10.541cm">
          <text:p text:style-name="P2"><text:span text:style-name="T18">Sout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3" draw:text-style-name="P3" draw:layer="layout" svg:width="10.413cm" svg:height="0.964cm" svg:x="13.919cm" svg:y="11.608cm">
          <text:p text:style-name="P2"><text:span text:style-name="T11">2021: DMK 31 seats → 2026: TVK 26, DMK 22, AIADMK 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4" draw:text-style-name="P3" draw:layer="layout" svg:width="22.859cm" svg:height="0.558cm" svg:x="1.524cm" svg:y="13.462cm">
          <text:p text:style-name="P2"><text:span text:style-name="T5">Source: ECI Results Portal 2021 &amp; 2026 <text:s/>· <text:s/>constituency_master.csv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0cm" svg:height="0cm" svg:x="0cm" svg:y="0cm" draw:page-number="4" presentation:class="page"/>
          <draw:frame draw:name="Notes Placeholder 2" presentation:style-name="pr5" draw:text-style-name="P5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7" draw:layer="layout" svg:width="0cm" svg:height="0cm" svg:x="0cm" svg:y="0cm" presentation:class="page-number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0" draw:style-name="gr5" draw:text-style-name="P4" draw:layer="layout" svg:width="25.399cm" svg:height="0.17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5" draw:text-style-name="P3" draw:layer="layout" svg:width="10.159cm" svg:height="0.761cm" svg:x="1.524cm" svg:y="0.559cm">
          <text:p text:style-name="P2"><text:span text:style-name="T19">STORY 0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6" draw:text-style-name="P3" draw:layer="layout" svg:width="22.859cm" svg:height="2.285cm" svg:x="1.524cm" svg:y="1.473cm">
          <text:p text:style-name="P2"><text:span text:style-name="T14">The Great Fli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7" draw:text-style-name="P3" draw:layer="layout" svg:width="21.589cm" svg:height="1.142cm" svg:x="1.524cm" svg:y="3.861cm">
          <text:p text:style-name="P2"><text:span text:style-name="T15">In how many constituencies did the winning party change between 2021 and 2026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8" draw:text-style-name="P14" draw:layer="layout" svg:width="6.984cm" svg:height="3.809cm" svg:x="1.27cm" svg:y="5.4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9" draw:text-style-name="P13" draw:layer="layout" svg:width="6.476cm" svg:height="2.031cm" svg:x="1.524cm" svg:y="5.715cm">
          <text:p text:style-name="P12"><text:span text:style-name="T20">23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0" draw:text-style-name="P13" draw:layer="layout" svg:width="6.476cm" svg:height="1.269cm" svg:x="1.524cm" svg:y="7.62cm">
          <text:p text:style-name="P12"><text:span text:style-name="T11">Total Constituenci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8" draw:text-style-name="P14" draw:layer="layout" svg:width="6.984cm" svg:height="3.809cm" svg:x="9.144cm" svg:y="5.4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1" draw:text-style-name="P13" draw:layer="layout" svg:width="6.476cm" svg:height="2.031cm" svg:x="9.398cm" svg:y="5.715cm">
          <text:p text:style-name="P12"><text:span text:style-name="T21">16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2" draw:text-style-name="P13" draw:layer="layout" svg:width="6.476cm" svg:height="1.269cm" svg:x="9.398cm" svg:y="7.62cm">
          <text:p text:style-name="P12"><text:span text:style-name="T11">Seats Changed Han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8" draw:text-style-name="P14" draw:layer="layout" svg:width="6.984cm" svg:height="3.809cm" svg:x="17.018cm" svg:y="5.4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53" draw:text-style-name="P13" draw:layer="layout" svg:width="6.476cm" svg:height="2.031cm" svg:x="17.272cm" svg:y="5.715cm">
          <text:p text:style-name="P12"><text:span text:style-name="T22">70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54" draw:text-style-name="P13" draw:layer="layout" svg:width="6.476cm" svg:height="1.269cm" svg:x="17.272cm" svg:y="7.62cm">
          <text:p text:style-name="P12"><text:span text:style-name="T11">Of All Seats Flipp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55" draw:text-style-name="P3" draw:layer="layout" svg:width="22.351cm" svg:height="0.634cm" svg:x="1.524cm" svg:y="9.652cm">
          <text:p text:style-name="P2"><text:span text:style-name="T23">Party-to-Party Transition Matrix <text:s/>(rows = 2021 winner · columns = 2026 winner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6" draw:layer="layout" svg:width="20.319cm" svg:height="5.095cm" svg:x="1.27cm" svg:y="10.514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12"><text:span text:style-name="T24">TVK</text:span></text:p>
              </table:table-cell>
              <table:table-cell>
                <text:p text:style-name="P12"><text:span text:style-name="T24">AIADMK</text:span></text:p>
              </table:table-cell>
              <table:table-cell>
                <text:p text:style-name="P12"><text:span text:style-name="T24">BJP</text:span></text:p>
              </table:table-cell>
              <table:table-cell>
                <text:p text:style-name="P12"><text:span text:style-name="T24">DMK</text:span></text:p>
              </table:table-cell>
              <table:table-cell>
                <text:p text:style-name="P12"><text:span text:style-name="T24">INC</text:span></text:p>
              </table:table-cell>
              <table:table-cell>
                <text:p text:style-name="P12"><text:span text:style-name="T24">Others</text:span></text:p>
              </table:table-cell>
              <table:table-cell>
                <text:p text:style-name="P12"><text:span text:style-name="T24">PMK</text:span></text:p>
              </table:table-cell>
              <table:table-cell>
                <text:p text:style-name="P12"><text:span text:style-name="T24">Total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24">AIADMK</text:span></text:p>
              </table:table-cell>
              <table:table-cell table:style-name="ce4">
                <text:p text:style-name="P12"><text:span text:style-name="T25">26</text:span></text:p>
              </table:table-cell>
              <table:table-cell>
                <text:p text:style-name="P12"><text:span text:style-name="T5">22</text:span></text:p>
              </table:table-cell>
              <table:table-cell>
                <text:p text:style-name="P12"><text:span text:style-name="T5">__</text:span></text:p>
              </table:table-cell>
              <table:table-cell>
                <text:p text:style-name="P12"><text:span text:style-name="T5">15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2</text:span></text:p>
              </table:table-cell>
              <table:table-cell>
                <text:p text:style-name="P12"><text:span text:style-name="T5">—</text:span></text:p>
              </table:table-cell>
              <table:table-cell>
                <text:p text:style-name="P12"><text:span text:style-name="T5">66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24">DMK</text:span></text:p>
              </table:table-cell>
              <table:table-cell table:style-name="ce4">
                <text:p text:style-name="P12"><text:span text:style-name="T25">65</text:span></text:p>
              </table:table-cell>
              <table:table-cell>
                <text:p text:style-name="P12"><text:span text:style-name="T5">22</text:span></text:p>
              </table:table-cell>
              <table:table-cell>
                <text:p text:style-name="P12"><text:span text:style-name="T5">—</text:span></text:p>
              </table:table-cell>
              <table:table-cell table:style-name="ce5">
                <text:p text:style-name="P12"><text:span text:style-name="T26">40</text:span></text:p>
              </table:table-cell>
              <table:table-cell>
                <text:p text:style-name="P12"><text:span text:style-name="T5">__</text:span></text:p>
              </table:table-cell>
              <table:table-cell>
                <text:p text:style-name="P12"><text:span text:style-name="T5">3</text:span></text:p>
              </table:table-cell>
              <table:table-cell>
                <text:p text:style-name="P12"><text:span text:style-name="T5">3</text:span></text:p>
              </table:table-cell>
              <table:table-cell>
                <text:p text:style-name="P12"><text:span text:style-name="T5">133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24">INC</text:span></text:p>
              </table:table-cell>
              <table:table-cell table:style-name="ce4">
                <text:p text:style-name="P12"><text:span text:style-name="T25">11</text:span></text:p>
              </table:table-cell>
              <table:table-cell>
                <text:p text:style-name="P12"><text:span text:style-name="T5">—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4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__</text:span></text:p>
              </table:table-cell>
              <table:table-cell>
                <text:p text:style-name="P12"><text:span text:style-name="T5">18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24">Others</text:span></text:p>
              </table:table-cell>
              <table:table-cell table:style-name="ce4">
                <text:p text:style-name="P12"><text:span text:style-name="T25">2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—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—</text:span></text:p>
              </table:table-cell>
              <table:table-cell>
                <text:p text:style-name="P12"><text:span text:style-name="T5">4</text:span></text:p>
              </table:table-cell>
              <table:table-cell>
                <text:p text:style-name="P12"><text:span text:style-name="T5">___</text:span></text:p>
              </table:table-cell>
              <table:table-cell>
                <text:p text:style-name="P12"><text:span text:style-name="T5">8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24">PMK</text:span></text:p>
              </table:table-cell>
              <table:table-cell table:style-name="ce4">
                <text:p text:style-name="P12"><text:span text:style-name="T25">2</text:span></text:p>
              </table:table-cell>
              <table:table-cell>
                <text:p text:style-name="P12"><text:span text:style-name="T5">2</text:span></text:p>
              </table:table-cell>
              <table:table-cell>
                <text:p text:style-name="P12"><text:span text:style-name="T5">—</text:span></text:p>
              </table:table-cell>
              <table:table-cell>
                <text:p text:style-name="P12"><text:span text:style-name="T5">—</text:span></text:p>
              </table:table-cell>
              <table:table-cell>
                <text:p text:style-name="P12"><text:span text:style-name="T5">—</text:span></text:p>
              </table:table-cell>
              <table:table-cell>
                <text:p text:style-name="P12"><text:span text:style-name="T5">__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24">BJP</text:span></text:p>
              </table:table-cell>
              <table:table-cell table:style-name="ce4">
                <text:p text:style-name="P12"><text:span text:style-name="T25">2</text:span></text:p>
              </table:table-cell>
              <table:table-cell>
                <text:p text:style-name="P12"><text:span text:style-name="T5">—</text:span></text:p>
              </table:table-cell>
              <table:table-cell>
                <text:p text:style-name="P12"><text:span text:style-name="T5">__</text:span></text:p>
              </table:table-cell>
              <table:table-cell>
                <text:p text:style-name="P12"><text:span text:style-name="T5">2</text:span></text:p>
              </table:table-cell>
              <table:table-cell>
                <text:p text:style-name="P12"><text:span text:style-name="T5">—</text:span></text:p>
              </table:table-cell>
              <table:table-cell>
                <text:p text:style-name="P12"><text:span text:style-name="T5">__</text:span></text:p>
              </table:table-cell>
              <table:table-cell>
                <text:p text:style-name="P12"><text:span text:style-name="T5">—</text:span></text:p>
              </table:table-cell>
              <table:table-cell>
                <text:p text:style-name="P12"><text:span text:style-name="T5">4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24">Total</text:span></text:p>
              </table:table-cell>
              <table:table-cell>
                <text:p text:style-name="P12"><text:span text:style-name="T24">108</text:span></text:p>
              </table:table-cell>
              <table:table-cell>
                <text:p text:style-name="P12"><text:span text:style-name="T24">15</text:span></text:p>
              </table:table-cell>
              <table:table-cell>
                <text:p text:style-name="P12"><text:span text:style-name="T24">1</text:span></text:p>
              </table:table-cell>
              <table:table-cell>
                <text:p text:style-name="P12"><text:span text:style-name="T24">59</text:span></text:p>
              </table:table-cell>
              <table:table-cell>
                <text:p text:style-name="P12"><text:span text:style-name="T24">5</text:span></text:p>
              </table:table-cell>
              <table:table-cell>
                <text:p text:style-name="P12"><text:span text:style-name="T24">10</text:span></text:p>
              </table:table-cell>
              <table:table-cell>
                <text:p text:style-name="P12"><text:span text:style-name="T24">4</text:span></text:p>
              </table:table-cell>
              <table:table-cell>
                <text:p text:style-name="P12"><text:span text:style-name="T24">23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10" draw:layer="layout" svg:width="0cm" svg:height="0cm" svg:x="0cm" svg:y="0cm" draw:page-number="5" presentation:class="page"/>
          <draw:frame draw:name="Notes Placeholder 2" presentation:style-name="pr6" draw:text-style-name="P5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7" draw:layer="layout" svg:width="0cm" svg:height="0cm" svg:x="0cm" svg:y="0cm" presentation:class="page-number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DEFAULT">
        <draw:custom-shape draw:name="Text 0" draw:style-name="gr57" draw:text-style-name="P3" draw:layer="layout" svg:width="20.319cm" svg:height="0.761cm" svg:x="1.524cm" svg:y="0.711cm">
          <text:p text:style-name="P2"><text:span text:style-name="T19">STORY 02 — KEY FIND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8" draw:text-style-name="P3" draw:layer="layout" svg:width="22.351cm" svg:height="2.158cm" svg:x="1.524cm" svg:y="1.651cm">
          <text:p text:style-name="P2"><text:span text:style-name="T27">TVK captured 108 seats — nearly half the assembly — in its debut ele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0" draw:style-name="gr27" draw:text-style-name="P10" draw:layer="layout" svg:width="14.731cm" svg:height="8.889cm" svg:x="1.27cm" svg:y="4.1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name="Shape 2" draw:style-name="gr13" draw:text-style-name="P8" draw:layer="layout" svg:width="7.873cm" svg:height="2.082cm" svg:x="16.637cm" svg:y="4.19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9" draw:text-style-name="P3" draw:layer="layout" svg:width="7.111cm" svg:height="1.828cm" svg:x="17.145cm" svg:y="4.318cm">
          <text:p text:style-name="P2"><text:span text:style-name="T28">TVK: 108 seats won</text:span></text:p>
          <text:p text:style-name="P2"><text:span text:style-name="T28">65 flipped from DMK</text:span></text:p>
          <text:p text:style-name="P2"><text:span text:style-name="T28">22 flipped from AIADM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3" draw:text-style-name="P8" draw:layer="layout" svg:width="7.873cm" svg:height="2.082cm" svg:x="16.637cm" svg:y="6.52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0" draw:text-style-name="P3" draw:layer="layout" svg:width="7.111cm" svg:height="1.828cm" svg:x="17.145cm" svg:y="6.655cm">
          <text:p text:style-name="P2"><text:span text:style-name="T28">DMK: 59 seats</text:span></text:p>
          <text:p text:style-name="P2"><text:span text:style-name="T28">Held 40 of its 2021 sea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3" draw:text-style-name="P8" draw:layer="layout" svg:width="7.873cm" svg:height="2.082cm" svg:x="16.637cm" svg:y="8.86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1" draw:text-style-name="P3" draw:layer="layout" svg:width="7.111cm" svg:height="1.828cm" svg:x="17.145cm" svg:y="8.992cm">
          <text:p text:style-name="P2"><text:span text:style-name="T28">AIADMK: only 15 held</text:span></text:p>
          <text:p text:style-name="P2"><text:span text:style-name="T28">Lost 26 to TVK alo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3" draw:text-style-name="P8" draw:layer="layout" svg:width="7.873cm" svg:height="2.082cm" svg:x="16.637cm" svg:y="11.2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2" draw:text-style-name="P3" draw:layer="layout" svg:width="7.111cm" svg:height="1.828cm" svg:x="17.145cm" svg:y="11.328cm">
          <text:p text:style-name="P2"><text:span text:style-name="T28">71 seats same party won</text:span></text:p>
          <text:p text:style-name="P2"><text:span text:style-name="T28">Just 30% continu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63" draw:text-style-name="P3" draw:layer="layout" svg:width="22.859cm" svg:height="0.558cm" svg:x="1.524cm" svg:y="13.462cm">
          <text:p text:style-name="P2"><text:span text:style-name="T5">Source: ECI Results Portal 2021 &amp;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0cm" svg:height="0cm" svg:x="0cm" svg:y="0cm" draw:page-number="6" presentation:class="page"/>
          <draw:frame draw:name="Notes Placeholder 2" presentation:style-name="pr7" draw:text-style-name="P5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7" draw:layer="layout" svg:width="0cm" svg:height="0cm" svg:x="0cm" svg:y="0cm" presentation:class="page-number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custom-shape draw:name="Shape 0" draw:style-name="gr20" draw:text-style-name="P9" draw:layer="layout" svg:width="25.399cm" svg:height="0.17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4" draw:text-style-name="P3" draw:layer="layout" svg:width="10.159cm" svg:height="0.761cm" svg:x="1.524cm" svg:y="0.559cm">
          <text:p text:style-name="P2"><text:span text:style-name="T29">STORY 0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5" draw:text-style-name="P3" draw:layer="layout" svg:width="22.859cm" svg:height="2.285cm" svg:x="1.524cm" svg:y="1.473cm">
          <text:p text:style-name="P2"><text:span text:style-name="T14">Margin of Victo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6" draw:text-style-name="P3" draw:layer="layout" svg:width="21.589cm" svg:height="1.142cm" svg:x="1.524cm" svg:y="3.861cm">
          <text:p text:style-name="P2"><text:span text:style-name="T15">What was the margin of victory in the 163 flipped constituencies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8" draw:text-style-name="P14" draw:layer="layout" svg:width="7.111cm" svg:height="4.063cm" svg:x="1.27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7" draw:text-style-name="P13" draw:layer="layout" svg:width="6.603cm" svg:height="2.412cm" svg:x="1.524cm" svg:y="5.588cm">
          <text:p text:style-name="P12"><text:span text:style-name="T30">8.3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8" draw:text-style-name="P13" draw:layer="layout" svg:width="6.603cm" svg:height="1.218cm" svg:x="1.524cm" svg:y="7.925cm">
          <text:p text:style-name="P12"><text:span text:style-name="T23">Avg Margin of Victory</text:span></text:p>
          <text:p text:style-name="P12"><text:span text:style-name="T23">in Flipped Sea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0" draw:style-name="gr27" draw:text-style-name="P10" draw:layer="layout" svg:width="8.127cm" svg:height="5.079cm" svg:x="8.89cm" svg:y="5.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name="Shape 7" draw:style-name="gr69" draw:text-style-name="P14" draw:layer="layout" svg:width="6.603cm" svg:height="2.082cm" svg:x="17.78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70" draw:text-style-name="P15" draw:layer="layout" svg:width="0.177cm" svg:height="2.082cm" svg:x="17.78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1" draw:text-style-name="P3" draw:layer="layout" svg:width="5.841cm" svg:height="0.812cm" svg:x="18.161cm" svg:y="5.486cm">
          <text:p text:style-name="P2"><text:span text:style-name="T23">Close (&lt;5%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2" draw:text-style-name="P3" draw:layer="layout" svg:width="5.841cm" svg:height="0.761cm" svg:x="18.161cm" svg:y="6.401cm">
          <text:p text:style-name="P2"><text:span text:style-name="T31">30 seats <text:s/>· <text:s/>18.4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69" draw:text-style-name="P14" draw:layer="layout" svg:width="6.603cm" svg:height="2.082cm" svg:x="17.78cm" svg:y="7.8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0.177cm" svg:height="2.082cm" svg:x="17.78cm" svg:y="7.8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73" draw:text-style-name="P3" draw:layer="layout" svg:width="5.841cm" svg:height="0.812cm" svg:x="18.161cm" svg:y="7.976cm">
          <text:p text:style-name="P2"><text:span text:style-name="T23">Moderate (5–15%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4" draw:text-style-name="P3" draw:layer="layout" svg:width="5.841cm" svg:height="0.761cm" svg:x="18.161cm" svg:y="8.89cm">
          <text:p text:style-name="P2"><text:span text:style-name="T31">69 seats <text:s/>· <text:s/>42.3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69" draw:text-style-name="P14" draw:layer="layout" svg:width="6.603cm" svg:height="2.082cm" svg:x="17.78cm" svg:y="10.3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5" draw:text-style-name="P4" draw:layer="layout" svg:width="0.177cm" svg:height="2.082cm" svg:x="17.78cm" svg:y="10.3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5" draw:text-style-name="P3" draw:layer="layout" svg:width="5.841cm" svg:height="0.812cm" svg:x="18.161cm" svg:y="10.465cm">
          <text:p text:style-name="P2"><text:span text:style-name="T23">Decisive (&gt;15%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6" draw:text-style-name="P3" draw:layer="layout" svg:width="5.841cm" svg:height="0.761cm" svg:x="18.161cm" svg:y="11.379cm">
          <text:p text:style-name="P2"><text:span text:style-name="T31">64 seats <text:s/>· <text:s/>39.3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77" draw:text-style-name="P3" draw:layer="layout" svg:width="22.859cm" svg:height="0.558cm" svg:x="1.524cm" svg:y="13.462cm">
          <text:p text:style-name="P2"><text:span text:style-name="T5">Only flipped constituencies included (n = 163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0cm" svg:height="0cm" svg:x="0cm" svg:y="0cm" draw:page-number="7" presentation:class="page"/>
          <draw:frame draw:name="Notes Placeholder 2" presentation:style-name="pr8" draw:text-style-name="P5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7" draw:layer="layout" svg:width="0cm" svg:height="0cm" svg:x="0cm" svg:y="0cm" presentation:class="page-number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DEFAULT">
        <draw:custom-shape draw:name="Text 0" draw:style-name="gr78" draw:text-style-name="P3" draw:layer="layout" svg:width="20.319cm" svg:height="0.761cm" svg:x="1.524cm" svg:y="0.711cm">
          <text:p text:style-name="P2"><text:span text:style-name="T29">STORY 03 — KEY FIND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9" draw:text-style-name="P3" draw:layer="layout" svg:width="22.351cm" svg:height="2.158cm" svg:x="1.524cm" svg:y="1.651cm">
          <text:p text:style-name="P2"><text:span text:style-name="T27">4 in 5 flipped seats were won with margins above 5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0" draw:style-name="gr27" draw:text-style-name="P10" draw:layer="layout" svg:width="14.731cm" svg:height="8.889cm" svg:x="1.27cm" svg:y="4.19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name="Shape 2" draw:style-name="gr13" draw:text-style-name="P8" draw:layer="layout" svg:width="7.873cm" svg:height="2.59cm" svg:x="16.637cm" svg:y="4.19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0" draw:text-style-name="P3" draw:layer="layout" svg:width="7.111cm" svg:height="1.066cm" svg:x="17.145cm" svg:y="4.318cm">
          <text:p text:style-name="P2"><text:span text:style-name="T32">81.6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1" draw:text-style-name="P3" draw:layer="layout" svg:width="7.111cm" svg:height="1.218cm" svg:x="17.145cm" svg:y="5.334cm">
          <text:p text:style-name="P2"><text:span text:style-name="T23">of flipped seats won with</text:span></text:p>
          <text:p text:style-name="P2"><text:span text:style-name="T23">margin above 5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3" draw:text-style-name="P8" draw:layer="layout" svg:width="7.873cm" svg:height="2.59cm" svg:x="16.637cm" svg:y="7.18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2" draw:text-style-name="P3" draw:layer="layout" svg:width="7.111cm" svg:height="1.066cm" svg:x="17.145cm" svg:y="7.315cm">
          <text:p text:style-name="P2"><text:span text:style-name="T32">TVK patter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3" draw:text-style-name="P3" draw:layer="layout" svg:width="7.111cm" svg:height="1.218cm" svg:x="17.145cm" svg:y="8.331cm">
          <text:p text:style-name="P2"><text:span text:style-name="T23">48 of its flipped wins</text:span></text:p>
          <text:p text:style-name="P2"><text:span text:style-name="T23">were above 15% marg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3" draw:text-style-name="P8" draw:layer="layout" svg:width="7.873cm" svg:height="2.59cm" svg:x="16.637cm" svg:y="10.18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4" draw:text-style-name="P3" draw:layer="layout" svg:width="7.111cm" svg:height="1.066cm" svg:x="17.145cm" svg:y="10.312cm">
          <text:p text:style-name="P2"><text:span text:style-name="T32">AIADM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85" draw:text-style-name="P3" draw:layer="layout" svg:width="7.111cm" svg:height="1.218cm" svg:x="17.145cm" svg:y="11.328cm">
          <text:p text:style-name="P2"><text:span text:style-name="T23">Won 15 seats in 2026</text:span></text:p>
          <text:p text:style-name="P2"><text:span text:style-name="T23">vs 66 seats in 202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86" draw:text-style-name="P3" draw:layer="layout" svg:width="22.859cm" svg:height="0.558cm" svg:x="1.524cm" svg:y="13.462cm">
          <text:p text:style-name="P2"><text:span text:style-name="T5">Source: ECI Results Portal 2021 &amp;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0cm" svg:height="0cm" svg:x="0cm" svg:y="0cm" draw:page-number="8" presentation:class="page"/>
          <draw:frame draw:name="Notes Placeholder 2" presentation:style-name="pr9" draw:text-style-name="P5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7" draw:layer="layout" svg:width="0cm" svg:height="0cm" svg:x="0cm" svg:y="0cm" presentation:class="page-number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custom-shape draw:name="Shape 0" draw:style-name="gr1" draw:text-style-name="P1" draw:layer="layout" svg:width="25.399cm" svg:height="0.17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7" draw:text-style-name="P3" draw:layer="layout" svg:width="22.351cm" svg:height="2.158cm" svg:x="1.524cm" svg:y="1.397cm">
          <text:p text:style-name="P2"><text:span text:style-name="T33">The Story Arc for Your Sh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8" draw:text-style-name="P3" draw:layer="layout" svg:width="22.351cm" svg:height="1.523cm" svg:x="1.524cm" svg:y="3.81cm">
          <text:p text:style-name="P2"><text:span text:style-name="T34">Three segments. One through-line: 163 of 234 seats changed hands, with an average margin of 8.3% in flipped constituencie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8" draw:text-style-name="P14" draw:layer="layout" svg:width="7.111cm" svg:height="6.476cm" svg:x="1.27cm" svg:y="5.84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7.111cm" svg:height="0.202cm" svg:x="1.27cm" svg:y="5.84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9" draw:text-style-name="P3" draw:layer="layout" svg:width="6.095cm" svg:height="1.269cm" svg:x="1.778cm" svg:y="6.35cm">
          <text:p text:style-name="P2"><text:span text:style-name="T35">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0" draw:text-style-name="P3" draw:layer="layout" svg:width="6.095cm" svg:height="1.066cm" svg:x="1.778cm" svg:y="7.671cm">
          <text:p text:style-name="P2"><text:span text:style-name="T36">The Ma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1" draw:text-style-name="P3" draw:layer="layout" svg:width="6.095cm" svg:height="2.92cm" svg:x="1.778cm" svg:y="8.89cm">
          <text:p text:style-name="P2"><text:span text:style-name="T11">Set the scene.</text:span></text:p>
          <text:p text:style-name="P2"><text:span text:style-name="T11">Regional seat counts in 2021</text:span></text:p>
          <text:p text:style-name="P2"><text:span text:style-name="T11">vs 2026 across all 6 region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8" draw:text-style-name="P14" draw:layer="layout" svg:width="7.111cm" svg:height="6.476cm" svg:x="9.144cm" svg:y="5.84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5" draw:text-style-name="P4" draw:layer="layout" svg:width="7.111cm" svg:height="0.202cm" svg:x="9.144cm" svg:y="5.84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92" draw:text-style-name="P3" draw:layer="layout" svg:width="6.095cm" svg:height="1.269cm" svg:x="9.652cm" svg:y="6.35cm">
          <text:p text:style-name="P2"><text:span text:style-name="T37">0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93" draw:text-style-name="P3" draw:layer="layout" svg:width="6.095cm" svg:height="1.066cm" svg:x="9.652cm" svg:y="7.671cm">
          <text:p text:style-name="P2"><text:span text:style-name="T36">The Fli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4" draw:text-style-name="P3" draw:layer="layout" svg:width="6.095cm" svg:height="2.92cm" svg:x="9.652cm" svg:y="8.89cm">
          <text:p text:style-name="P2"><text:span text:style-name="T11">Show the movement.</text:span></text:p>
          <text:p text:style-name="P2"><text:span text:style-name="T11">163 seats changed hands.</text:span></text:p>
          <text:p text:style-name="P2"><text:span text:style-name="T11">The transition matrix on the previous slid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8" draw:text-style-name="P14" draw:layer="layout" svg:width="7.111cm" svg:height="6.476cm" svg:x="17.018cm" svg:y="5.84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0" draw:text-style-name="P9" draw:layer="layout" svg:width="7.111cm" svg:height="0.202cm" svg:x="17.018cm" svg:y="5.84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5" draw:text-style-name="P3" draw:layer="layout" svg:width="6.095cm" svg:height="1.269cm" svg:x="17.526cm" svg:y="6.35cm">
          <text:p text:style-name="P2"><text:span text:style-name="T38">0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96" draw:text-style-name="P3" draw:layer="layout" svg:width="6.095cm" svg:height="1.066cm" svg:x="17.526cm" svg:y="7.671cm">
          <text:p text:style-name="P2"><text:span text:style-name="T36">The Marg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97" draw:text-style-name="P3" draw:layer="layout" svg:width="6.095cm" svg:height="2.92cm" svg:x="17.526cm" svg:y="8.89cm">
          <text:p text:style-name="P2"><text:span text:style-name="T11">Show the margin data.</text:span></text:p>
          <text:p text:style-name="P2"><text:span text:style-name="T11">81.6% of flips had margin</text:span></text:p>
          <text:p text:style-name="P2"><text:span text:style-name="T11">above 5%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98" draw:text-style-name="P13" draw:layer="layout" svg:width="0.888cm" svg:height="1.015cm" svg:x="8.585cm" svg:y="8.763cm">
          <text:p text:style-name="P12"><text:span text:style-name="T39">→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99" draw:text-style-name="P13" draw:layer="layout" svg:width="0.888cm" svg:height="1.015cm" svg:x="16.459cm" svg:y="8.763cm">
          <text:p text:style-name="P12"><text:span text:style-name="T39">→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00" draw:text-style-name="P3" draw:layer="layout" svg:width="22.859cm" svg:height="0.558cm" svg:x="1.524cm" svg:y="13.462cm">
          <text:p text:style-name="P2"><text:span text:style-name="T5">Data Source: ECI Results Portal 2026 · ECI Statistical Reports 2021 · tn_2021_results.csv · tn_2026_results.csv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0cm" svg:height="0cm" svg:x="0cm" svg:y="0cm" draw:page-number="9" presentation:class="page"/>
          <draw:frame draw:name="Notes Placeholder 2" presentation:style-name="pr10" draw:text-style-name="P5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7" draw:layer="layout" svg:width="0cm" svg:height="0cm" svg:x="0cm" svg:y="0cm" presentation:class="page-number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DEFAULT">
        <draw:custom-shape draw:name="Shape 0" draw:style-name="gr1" draw:text-style-name="P1" draw:layer="layout" svg:width="25.399cm" svg:height="0.17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1" draw:text-style-name="P3" draw:layer="layout" svg:width="20.319cm" svg:height="0.761cm" svg:x="1.524cm" svg:y="0.559cm">
          <text:p text:style-name="P2"><text:span text:style-name="T1">DATA &amp; METHODOLOG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2" draw:text-style-name="P3" draw:layer="layout" svg:width="22.351cm" svg:height="1.828cm" svg:x="1.524cm" svg:y="1.473cm">
          <text:p text:style-name="P2"><text:span text:style-name="T7">How This Analysis Was Buil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3" draw:text-style-name="P8" draw:layer="layout" svg:width="11.175cm" svg:height="9.905cm" svg:x="1.27cm" svg:y="3.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11.175cm" svg:height="0.202cm" svg:x="1.27cm" svg:y="3.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3" draw:text-style-name="P3" draw:layer="layout" svg:width="10.159cm" svg:height="1.015cm" svg:x="1.778cm" svg:y="4.115cm">
          <text:p text:style-name="P2"><text:span text:style-name="T10">Data Sourc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0.151cm" svg:height="0.888cm" svg:x="1.651cm" svg:y="5.38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4" draw:text-style-name="P3" draw:layer="layout" svg:width="9.905cm" svg:height="0.558cm" svg:x="2.032cm" svg:y="5.41cm">
          <text:p text:style-name="P2"><text:span text:style-name="T40">ECI Results Portal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5" draw:text-style-name="P3" draw:layer="layout" svg:width="9.905cm" svg:height="0.558cm" svg:x="2.032cm" svg:y="5.944cm">
          <text:p text:style-name="P2"><text:span text:style-name="T5">results.eci.gov.in — constituency-wise results, candidates, vo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0.151cm" svg:height="0.888cm" svg:x="1.651cm" svg:y="6.9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6" draw:text-style-name="P3" draw:layer="layout" svg:width="9.905cm" svg:height="0.558cm" svg:x="2.032cm" svg:y="6.985cm">
          <text:p text:style-name="P2"><text:span text:style-name="T40">ECI Statistical Reports 202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07" draw:text-style-name="P3" draw:layer="layout" svg:width="9.905cm" svg:height="0.558cm" svg:x="2.032cm" svg:y="7.518cm">
          <text:p text:style-name="P2"><text:span text:style-name="T5">eci.gov.in/statistical-reports — official PDF repor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0.151cm" svg:height="0.888cm" svg:x="1.651cm" svg:y="8.5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08" draw:text-style-name="P3" draw:layer="layout" svg:width="9.905cm" svg:height="0.558cm" svg:x="2.032cm" svg:y="8.56cm">
          <text:p text:style-name="P2"><text:span text:style-name="T40">tn_2026_results.csv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9" draw:text-style-name="P3" draw:layer="layout" svg:width="9.905cm" svg:height="0.558cm" svg:x="2.032cm" svg:y="9.093cm">
          <text:p text:style-name="P2"><text:span text:style-name="T5">Codebasics starter pack — 234 constituencies, candidate-lev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0.151cm" svg:height="0.888cm" svg:x="1.651cm" svg:y="10.10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10" draw:text-style-name="P3" draw:layer="layout" svg:width="9.905cm" svg:height="0.558cm" svg:x="2.032cm" svg:y="10.135cm">
          <text:p text:style-name="P2"><text:span text:style-name="T40">tn_2021_results.csv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1" draw:text-style-name="P3" draw:layer="layout" svg:width="9.905cm" svg:height="0.558cm" svg:x="2.032cm" svg:y="10.668cm">
          <text:p text:style-name="P2"><text:span text:style-name="T5">Codebasics starter pack — same schema as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" draw:text-style-name="P1" draw:layer="layout" svg:width="0.151cm" svg:height="0.888cm" svg:x="1.651cm" svg:y="11.68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12" draw:text-style-name="P3" draw:layer="layout" svg:width="9.905cm" svg:height="0.558cm" svg:x="2.032cm" svg:y="11.709cm">
          <text:p text:style-name="P2"><text:span text:style-name="T40">constituency_master.csv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13" draw:text-style-name="P3" draw:layer="layout" svg:width="9.905cm" svg:height="0.558cm" svg:x="2.032cm" svg:y="12.243cm">
          <text:p text:style-name="P2"><text:span text:style-name="T5">Region mapping for all 234 constituenci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3" draw:text-style-name="P8" draw:layer="layout" svg:width="11.175cm" svg:height="9.905cm" svg:x="12.954cm" svg:y="3.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5" draw:text-style-name="P4" draw:layer="layout" svg:width="11.175cm" svg:height="0.202cm" svg:x="12.954cm" svg:y="3.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14" draw:text-style-name="P3" draw:layer="layout" svg:width="10.159cm" svg:height="1.015cm" svg:x="13.462cm" svg:y="4.115cm">
          <text:p text:style-name="P2"><text:span text:style-name="T10">Analytical Approa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5" draw:text-style-name="P4" draw:layer="layout" svg:width="0.964cm" svg:height="0.964cm" svg:x="13.335cm" svg:y="5.38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15" draw:text-style-name="P13" draw:layer="layout" svg:width="0.964cm" svg:height="0.761cm" svg:x="13.335cm" svg:y="5.486cm">
          <text:p text:style-name="P12"><text:span text:style-name="T41">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16" draw:text-style-name="P3" draw:layer="layout" svg:width="9.27cm" svg:height="0.634cm" svg:x="14.529cm" svg:y="5.41cm">
          <text:p text:style-name="P2"><text:span text:style-name="T40">Data Prepar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17" draw:text-style-name="P3" draw:layer="layout" svg:width="9.27cm" svg:height="1.066cm" svg:x="14.529cm" svg:y="6.045cm">
          <text:p text:style-name="P2"><text:span text:style-name="T5">SQL used to clean, join, and query election tables</text:span></text:p>
          <text:p text:style-name="P2"><text:span text:style-name="T5">using constituency identifiers across both yea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5" draw:text-style-name="P4" draw:layer="layout" svg:width="0.964cm" svg:height="0.964cm" svg:x="13.335cm" svg:y="7.46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18" draw:text-style-name="P13" draw:layer="layout" svg:width="0.964cm" svg:height="0.761cm" svg:x="13.335cm" svg:y="7.569cm">
          <text:p text:style-name="P12"><text:span text:style-name="T41">0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19" draw:text-style-name="P3" draw:layer="layout" svg:width="9.27cm" svg:height="0.634cm" svg:x="14.529cm" svg:y="7.493cm">
          <text:p text:style-name="P2"><text:span text:style-name="T40">Regional Comparis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20" draw:text-style-name="P3" draw:layer="layout" svg:width="9.27cm" svg:height="1.066cm" svg:x="14.529cm" svg:y="8.128cm">
          <text:p text:style-name="P2"><text:span text:style-name="T5">Party seat counts compared across 6 regions</text:span></text:p>
          <text:p text:style-name="P2"><text:span text:style-name="T5">between 2021 and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5" draw:text-style-name="P4" draw:layer="layout" svg:width="0.964cm" svg:height="0.964cm" svg:x="13.335cm" svg:y="9.5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21" draw:text-style-name="P13" draw:layer="layout" svg:width="0.964cm" svg:height="0.761cm" svg:x="13.335cm" svg:y="9.652cm">
          <text:p text:style-name="P12"><text:span text:style-name="T41">0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22" draw:text-style-name="P3" draw:layer="layout" svg:width="9.27cm" svg:height="0.634cm" svg:x="14.529cm" svg:y="9.576cm">
          <text:p text:style-name="P2"><text:span text:style-name="T40">Flip Analysi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23" draw:text-style-name="P3" draw:layer="layout" svg:width="9.27cm" svg:height="1.066cm" svg:x="14.529cm" svg:y="10.211cm">
          <text:p text:style-name="P2"><text:span text:style-name="T5">Constituencies where the winning party changed</text:span></text:p>
          <text:p text:style-name="P2"><text:span text:style-name="T5">between 2021 and 2026 identified and mapp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5" draw:text-style-name="P4" draw:layer="layout" svg:width="0.964cm" svg:height="0.964cm" svg:x="13.335cm" svg:y="11.63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24" draw:text-style-name="P13" draw:layer="layout" svg:width="0.964cm" svg:height="0.761cm" svg:x="13.335cm" svg:y="11.735cm">
          <text:p text:style-name="P12"><text:span text:style-name="T41">0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125" draw:text-style-name="P3" draw:layer="layout" svg:width="9.27cm" svg:height="0.634cm" svg:x="14.529cm" svg:y="11.659cm">
          <text:p text:style-name="P2"><text:span text:style-name="T40">Margin Categoris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26" draw:text-style-name="P3" draw:layer="layout" svg:width="9.27cm" svg:height="1.066cm" svg:x="14.529cm" svg:y="12.294cm">
          <text:p text:style-name="P2"><text:span text:style-name="T5">Victory margins split into Close (&lt;5%),</text:span></text:p>
          <text:p text:style-name="P2"><text:span text:style-name="T5">Moderate (5–15%), and Decisive (&gt;15%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127" draw:text-style-name="P16" draw:layer="layout" svg:width="22.859cm" svg:height="1.396cm" svg:x="1.27cm" svg:y="14.0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28" draw:text-style-name="P3" draw:layer="layout" svg:width="3.047cm" svg:height="0.888cm" svg:x="1.905cm" svg:y="14.148cm">
          <text:p text:style-name="P2"><text:span text:style-name="T42">Tools Used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129" draw:text-style-name="P3" draw:layer="layout" svg:width="6.349cm" svg:height="0.888cm" svg:x="4.826cm" svg:y="14.148cm">
          <text:p text:style-name="P2"><text:span text:style-name="T43">SQL <text:s/>· <text:s/>Data preparation &amp; query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30" draw:text-style-name="P3" draw:layer="layout" svg:width="6.349cm" svg:height="0.888cm" svg:x="11.43cm" svg:y="14.148cm">
          <text:p text:style-name="P2"><text:span text:style-name="T43">Power BI <text:s/>· <text:s/>Visualisation &amp; storytell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131" draw:text-style-name="P3" draw:layer="layout" svg:width="6.349cm" svg:height="0.888cm" svg:x="18.034cm" svg:y="14.148cm">
          <text:p text:style-name="P2"><text:span text:style-name="T43">ECI Data only <text:s/>· <text:s/>No exit polls or news sourc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0cm" svg:height="0cm" svg:x="0cm" svg:y="0cm" draw:page-number="10" presentation:class="page"/>
          <draw:frame draw:name="Notes Placeholder 2" presentation:style-name="pr11" draw:text-style-name="P5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7" draw:layer="layout" svg:width="0cm" svg:height="0cm" svg:x="0cm" svg:y="0cm" presentation:class="page-number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Decoding Tamil Nadu 2026 — AtliQ Media</dc:title>
    <dc:subject>PptxGenJS Presentation</dc:subject>
    <meta:initial-creator>PptxGenJS</meta:initial-creator>
    <meta:editing-cycles>2</meta:editing-cycles>
    <meta:creation-date>2026-06-03T18:54:20</meta:creation-date>
    <dc:date>2026-06-06T21:36:45.491368800</dc:date>
    <meta:editing-duration>PT1H56M36S</meta:editing-duration>
    <meta:generator>LibreOffice/26.2.3.2$Windows_X86_64 LibreOffice_project/70e089b17412e4cb7773e41413306b17a2328c34</meta:generator>
    <meta:document-statistic meta:object-count="236"/>
    <meta:user-defined meta:name="AppVersion">16.0000</meta:user-defined>
    <meta:user-defined meta:name="Company">PptxGenJS</meta:user-defined>
    <meta:user-defined meta:name="Notes" meta:value-type="float">10</meta:user-defined>
    <meta:user-defined meta:name="PresentationFormat">On-screen Show (16:9)</meta:user-defined>
    <meta:user-defined meta:name="Slides" meta:value-type="float">1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1e293b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94a3b8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ignore" loext:external-data="ppt/embeddings/Microsoft_Excel_Worksheet.xlsx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35cm" svg:stroke-color="#888888"/>
      <style:text-properties fo:color="#94a3b8" style:text-position="0% 100%" fo:font-family="Arial" fo:font-size="12pt" style:font-size-asian="12pt" style:font-size-complex="12pt"/>
    </style:style>
    <style:style style:name="ch6" style:family="chart" style:data-style-name="N0">
      <style:chart-properties chart:display-label="true" chart:logarithmic="false" chart:interval-minor-divisor="5" chart:gap-width="50" chart:overlap="100" chart:reverse-direction="false" text:line-break="false" loext:try-staggering-first="false" chart:link-data-style-to-source="false" chart:axis-position="0" chart:axis-label-position="outside-start" chart:tick-mark-position="at-axis"/>
      <style:graphic-properties svg:stroke-width="0.035cm" svg:stroke-color="#888888"/>
      <style:text-properties fo:color="#94a3b8" style:text-position="0% 100%" fo:font-family="Arial" fo:font-size="12pt" style:font-size-asian="12pt" style:font-size-complex="12pt"/>
    </style:style>
    <style:style style:name="ch7" style:family="chart">
      <style:graphic-properties svg:stroke-width="0.018cm" svg:stroke-color="#334155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16a34a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dc2626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64748b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b82f6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97316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78bfa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  <style:style style:name="T1" style:family="text">
      <style:text-properties fo:color="#94a3b8" style:text-position="0% 100%" fo:font-family="Arial" fo:font-size="12pt" fo:language="en" fo:country="IN" style:font-size-asian="12pt" style:font-size-complex="12pt"/>
    </style:style>
  </office:automatic-styles>
  <office:body>
    <office:chart>
      <chart:chart svg:width="10.922cm" svg:height="7.874cm" xlink:href="." xlink:type="simple" chart:class="chart:bar" chart:style-name="ch1">
        <chart:title svg:x="3.032cm" svg:y="0.292cm" chart:style-name="ch2">
          <text:p><text:span text:style-name="T1">2021 — Seat Distribution</text:span></text:p>
        </chart:title>
        <chart:legend chart:legend-position="bottom" svg:x="1.919cm" svg:y="7.354cm" style:legend-expansion="wide" chart:style-name="ch3"/>
        <chart:plot-area chart:style-name="ch4" svg:x="0.218cm" svg:y="1.17cm" svg:width="10.486cm" svg:height="5.843cm">
          <chart:coordinate-region svg:x="3.246cm" svg:y="1.17cm" svg:width="7.221cm" svg:height="5.127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series chart:style-name="ch10" chart:values-cell-range-address="local-table.$D$2:.$D$7" chart:label-cell-address="local-table.$D$1" chart:class="chart:bar">
            <chart:data-point chart:repeated="6"/>
          </chart:series>
          <chart:series chart:style-name="ch11" chart:values-cell-range-address="local-table.$E$2:.$E$7" chart:label-cell-address="local-table.$E$1" chart:class="chart:bar">
            <chart:data-point chart:repeated="6"/>
          </chart:series>
          <chart:series chart:style-name="ch12" chart:values-cell-range-address="local-table.$F$2:.$F$7" chart:label-cell-address="local-table.$F$1" chart:class="chart:bar">
            <chart:data-point chart:repeated="6"/>
          </chart:series>
          <chart:series chart:style-name="ch13" chart:values-cell-range-address="local-table.$G$2:.$G$7" chart:label-cell-address="local-table.$G$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K</text:p>
              </table:table-cell>
              <table:table-cell office:value-type="string">
                <text:p>AIADMK</text:p>
              </table:table-cell>
              <table:table-cell office:value-type="string">
                <text:p>Others</text:p>
              </table:table-cell>
              <table:table-cell office:value-type="string">
                <text:p>INC</text:p>
              </table:table-cell>
              <table:table-cell office:value-type="string">
                <text:p>BJP</text:p>
              </table:table-cell>
              <table:table-cell office:value-type="string">
                <text:p>PMK</text:p>
              </table:table-cell>
            </table:table-row>
          </table:table-header-rows>
          <table:table-rows>
            <table:table-row>
              <table:table-cell office:value-type="string">
                <text:p>Central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ennai Metro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lta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ongu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rth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3.2$Windows_X86_64 LibreOffice_project/70e089b17412e4cb7773e41413306b17a2328c3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1e293b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94a3b8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ignore" loext:external-data="ppt/embeddings/Microsoft_Excel_Worksheet1.xlsx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35cm" svg:stroke-color="#888888"/>
      <style:text-properties fo:color="#94a3b8" style:text-position="0% 100%" fo:font-family="Arial" fo:font-size="12pt" style:font-size-asian="12pt" style:font-size-complex="12pt"/>
    </style:style>
    <style:style style:name="ch6" style:family="chart" style:data-style-name="N0">
      <style:chart-properties chart:display-label="true" chart:logarithmic="false" chart:interval-minor-divisor="5" chart:gap-width="50" chart:overlap="100" chart:reverse-direction="false" text:line-break="false" loext:try-staggering-first="false" chart:link-data-style-to-source="false" chart:axis-position="0" chart:axis-label-position="outside-start" chart:tick-mark-position="at-axis"/>
      <style:graphic-properties svg:stroke-width="0.035cm" svg:stroke-color="#888888"/>
      <style:text-properties fo:color="#94a3b8" style:text-position="0% 100%" fo:font-family="Arial" fo:font-size="12pt" style:font-size-asian="12pt" style:font-size-complex="12pt"/>
    </style:style>
    <style:style style:name="ch7" style:family="chart">
      <style:graphic-properties svg:stroke-width="0.018cm" svg:stroke-color="#334155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59e0b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16a34a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dc2626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64748b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b82f6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78bfa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97316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94a3b8" style:text-position="0% 100%" fo:font-family="Arial" fo:font-size="12pt" fo:language="en" fo:country="IN" style:font-size-asian="12pt" style:font-size-complex="12pt"/>
    </style:style>
  </office:automatic-styles>
  <office:body>
    <office:chart>
      <chart:chart svg:width="10.922cm" svg:height="7.874cm" xlink:href="." xlink:type="simple" chart:class="chart:bar" chart:style-name="ch1">
        <chart:title svg:x="3.032cm" svg:y="0.292cm" chart:style-name="ch2">
          <text:p><text:span text:style-name="T1">2026 — Seat Distribution</text:span></text:p>
        </chart:title>
        <chart:legend chart:legend-position="bottom" svg:x="2.916cm" svg:y="6.935cm" style:legend-expansion="wide" chart:style-name="ch3"/>
        <chart:plot-area chart:style-name="ch4" svg:x="0.218cm" svg:y="1.17cm" svg:width="10.486cm" svg:height="5.424cm">
          <chart:coordinate-region svg:x="3.246cm" svg:y="1.17cm" svg:width="7.221cm" svg:height="4.708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series chart:style-name="ch10" chart:values-cell-range-address="local-table.$D$2:.$D$7" chart:label-cell-address="local-table.$D$1" chart:class="chart:bar">
            <chart:data-point chart:repeated="6"/>
          </chart:series>
          <chart:series chart:style-name="ch11" chart:values-cell-range-address="local-table.$E$2:.$E$7" chart:label-cell-address="local-table.$E$1" chart:class="chart:bar">
            <chart:data-point chart:repeated="6"/>
          </chart:series>
          <chart:series chart:style-name="ch12" chart:values-cell-range-address="local-table.$F$2:.$F$7" chart:label-cell-address="local-table.$F$1" chart:class="chart:bar">
            <chart:data-point chart:repeated="6"/>
          </chart:series>
          <chart:series chart:style-name="ch13" chart:values-cell-range-address="local-table.$G$2:.$G$7" chart:label-cell-address="local-table.$G$1" chart:class="chart:bar">
            <chart:data-point chart:repeated="6"/>
          </chart:series>
          <chart:series chart:style-name="ch14" chart:values-cell-range-address="local-table.$H$2:.$H$7" chart:label-cell-address="local-table.$H$1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VK</text:p>
              </table:table-cell>
              <table:table-cell office:value-type="string">
                <text:p>DMK</text:p>
              </table:table-cell>
              <table:table-cell office:value-type="string">
                <text:p>AIADMK</text:p>
              </table:table-cell>
              <table:table-cell office:value-type="string">
                <text:p>Others</text:p>
              </table:table-cell>
              <table:table-cell office:value-type="string">
                <text:p>INC</text:p>
              </table:table-cell>
              <table:table-cell office:value-type="string">
                <text:p>PMK</text:p>
              </table:table-cell>
              <table:table-cell office:value-type="string">
                <text:p>BJP</text:p>
              </table:table-cell>
            </table:table-row>
          </table:table-header-rows>
          <table:table-rows>
            <table:table-row>
              <table:table-cell office:value-type="string">
                <text:p>Central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ennai Metro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lta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ongu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rth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3.2$Windows_X86_64 LibreOffice_project/70e089b17412e4cb7773e41413306b17a2328c3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ignore" loext:external-data="ppt/embeddings/Microsoft_Excel_Worksheet2.xlsx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35cm" svg:stroke-color="#888888"/>
      <style:text-properties fo:color="#334155" style:text-position="0% 100%" fo:font-family="Arial" fo:font-size="12pt" style:font-size-asian="12pt" style:font-size-complex="12pt"/>
    </style:style>
    <style:style style:name="ch5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axis-label-position="outside-start" chart:tick-mark-position="at-axis"/>
      <style:graphic-properties svg:stroke-width="0.035cm" svg:stroke-color="#888888"/>
      <style:text-properties fo:color="#334155" style:text-position="0% 100%" fo:font-family="Arial" fo:font-size="12pt" style:font-size-asian="12pt" style:font-size-complex="12pt"/>
    </style:style>
    <style:style style:name="ch6" style:family="chart">
      <style:graphic-properties svg:stroke-width="0.018cm" svg:stroke-color="#e2e8f0"/>
    </style:style>
    <style:style style:name="ch7" style:family="chart" style:data-style-name="N3">
      <style:chart-properties chart:link-data-style-to-source="false" chart:data-label-number="value" chart:data-label-text="false" chart:data-label-symbol="false" chart:data-label-series="false" chart:label-position="outside" loext:custom-leader-lines="false">
        <chart:label-separator>
          <text:p>; </text:p>
        </chart:label-separator>
      </style:chart-properties>
      <style:graphic-properties draw:stroke="none" draw:fill-color="#f59e0b" fo:wrap-option="wrap"/>
      <style:text-properties fo:color="#334155" style:text-position="0% 100%" fo:font-family="Arial" fo:font-size="11pt" style:font-size-asian="11pt" style:font-size-complex="11pt"/>
    </style:style>
    <style:style style:name="ch8" style:family="chart">
      <style:chart-properties chart:solid-type="cuboid"/>
      <style:graphic-properties/>
    </style:style>
    <style:style style:name="ch9" style:family="chart">
      <style:chart-properties chart:solid-type="cuboid"/>
      <style:graphic-properties draw:fill-color="#16a34a"/>
    </style:style>
    <style:style style:name="ch10" style:family="chart">
      <style:chart-properties chart:solid-type="cuboid"/>
      <style:graphic-properties draw:fill-color="#dc2626"/>
    </style:style>
    <style:style style:name="ch11" style:family="chart">
      <style:chart-properties chart:solid-type="cuboid"/>
      <style:graphic-properties draw:fill-color="#3b82f6"/>
    </style:style>
    <style:style style:name="ch12" style:family="chart">
      <style:chart-properties chart:solid-type="cuboid"/>
      <style:graphic-properties draw:fill-color="#64748b"/>
    </style:style>
    <style:style style:name="ch13" style:family="chart">
      <style:chart-properties chart:solid-type="cuboid"/>
      <style:graphic-properties draw:fill-color="#a78bfa"/>
    </style:style>
    <style:style style:name="ch14" style:family="chart">
      <style:chart-properties chart:solid-type="cuboid"/>
      <style:graphic-properties draw:fill-color="#f97316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334155" style:text-position="0% 100%" fo:font-family="Arial" fo:font-size="12pt" fo:language="en" fo:country="IN" style:font-size-asian="12pt" style:font-size-complex="12pt"/>
    </style:style>
  </office:automatic-styles>
  <office:body>
    <office:chart>
      <chart:chart svg:width="14.732cm" svg:height="8.89cm" xlink:href="." xlink:type="simple" chart:class="chart:bar" chart:style-name="ch1">
        <chart:title svg:x="4.478cm" svg:y="0.312cm" chart:style-name="ch2">
          <text:p><text:span text:style-name="T1">Seats Won — 2026 Assembly</text:span></text:p>
        </chart:title>
        <chart:plot-area chart:style-name="ch3" svg:x="0.294cm" svg:y="1.21cm" svg:width="14.144cm" svg:height="7.503cm">
          <chart:coordinate-region svg:x="2.168cm" svg:y="1.21cm" svg:width="11.916cm" svg:height="6.787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ts Won 2026</text:p>
              </table:table-cell>
            </table:table-row>
          </table:table-header-rows>
          <table:table-rows>
            <table:table-row>
              <table:table-cell office:value-type="string">
                <text:p>TVK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DMK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AIADMK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INC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MK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JP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3.2$Windows_X86_64 LibreOffice_project/70e089b17412e4cb7773e41413306b17a2328c3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 draw:fill-color="#1e293b"/>
    </style:style>
    <style:style style:name="ch2" style:family="chart">
      <style:chart-properties chart:auto-position="true"/>
      <style:graphic-properties draw:stroke="none" draw:fill="none" draw:fill-color="#d9d9d9"/>
      <style:text-properties fo:color="#94a3b8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ignore" loext:external-data="ppt/embeddings/Microsoft_Excel_Worksheet3.xlsx" chart:data-label-number="percentage" chart:data-label-text="tru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 style:percentage-data-style-name="N10">
      <style:chart-properties chart:link-data-style-to-source="false" chart:data-label-number="percentage" chart:data-label-text="true" chart:data-label-symbol="false" chart:data-label-series="false" chart:label-position="avoid-overlap" loext:custom-leader-lines="false">
        <chart:label-separator>
          <text:p><text:line-break/></text:p>
        </chart:label-separator>
      </style:chart-properties>
      <style:graphic-properties svg:stroke-width="0.026cm" svg:stroke-color="#f9f9f9" draw:fill-color="#4472c4" fo:wrap-option="wrap"/>
      <style:text-properties fo:color="#000000" style:text-position="0% 100%" fo:font-family="Arial" fo:font-size="18pt" style:font-size-asian="18pt" style:font-size-complex="18pt"/>
    </style:style>
    <style:style style:name="ch7" style:family="chart">
      <style:chart-properties chart:solid-type="cuboid" loext:label-stroke-color="#ffffff" chart:data-label-number="percentage" chart:data-label-text="false" chart:data-label-symbol="false" chart:data-label-series="false" chart:label-position="center"/>
      <style:graphic-properties draw:stroke="none" svg:stroke-width="0cm" draw:fill-color="#0891b2"/>
      <style:text-properties fo:color="#ffffff" fo:font-size="11pt" style:font-size-asian="11pt" style:font-size-complex="11pt"/>
    </style:style>
    <style:style style:name="ch8" style:family="chart">
      <style:graphic-properties svg:stroke-color="#ffffff"/>
    </style:style>
    <style:style style:name="ch9" style:family="chart">
      <style:chart-properties chart:solid-type="cuboid" loext:label-stroke-color="#ffffff" chart:data-label-number="percentage" chart:data-label-text="false" chart:data-label-symbol="false" chart:data-label-series="false" chart:label-position="center"/>
      <style:graphic-properties draw:stroke="none" svg:stroke-width="0cm" draw:fill-color="#f59e0b"/>
      <style:text-properties fo:color="#ffffff" fo:font-size="11pt" style:font-size-asian="11pt" style:font-size-complex="11pt"/>
    </style:style>
    <style:style style:name="ch10" style:family="chart">
      <style:chart-properties chart:solid-type="cuboid" loext:label-stroke-color="#ffffff" chart:data-label-number="percentage" chart:data-label-text="false" chart:data-label-symbol="false" chart:data-label-series="false" chart:label-position="center"/>
      <style:graphic-properties draw:stroke="none" svg:stroke-width="0cm" draw:fill-color="#ea580c"/>
      <style:text-properties fo:color="#ffffff" fo:font-size="11pt" style:font-size-asian="11pt" style:font-size-complex="11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8.128cm" svg:height="5.08cm" xlink:href="." xlink:type="simple" chart:class="chart:ring" chart:style-name="ch1">
        <chart:legend chart:legend-position="bottom" svg:x="1.337cm" svg:y="4.141cm" style:legend-expansion="wide" chart:style-name="ch2"/>
        <chart:plot-area chart:style-name="ch3" svg:x="0.35cm" svg:y="0.35cm" svg:width="7.428cm" svg:height="3.257cm">
          <chart:coordinate-region svg:x="2.549cm" svg:y="0.5cm" svg:width="3.018cm" svg:height="3.018cm"/>
          <chart:axis chart:dimension="x" chart:name="primary-x" chart:style-name="ch4" chartooo:axis-type="text">
            <chart:categories table:cell-range-address="local-table.$A$2:.$A$4"/>
          </chart:axis>
          <chart:axis chart:dimension="y" chart:name="primary-y" chart:style-name="ch5"/>
          <chart:series chart:style-name="ch6" chart:values-cell-range-address="local-table.$B$2:.$B$4" chart:label-cell-address="local-table.$B$1" chart:class="chart:circle">
            <chart:data-point chart:style-name="ch7">
              <chart:data-label chart:style-name="ch8">
                <text:p/>
              </chart:data-label>
            </chart:data-point>
            <chart:data-point chart:style-name="ch9">
              <chart:data-label chart:style-name="ch8">
                <text:p/>
              </chart:data-label>
            </chart:data-point>
            <chart:data-point chart:style-name="ch10">
              <chart:data-label chart:style-name="ch8">
                <text:p/>
              </chart:data-label>
            </chart:data-point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gin Category</text:p>
              </table:table-cell>
            </table:table-row>
          </table:table-header-rows>
          <table:table-rows>
            <table:table-row>
              <table:table-cell office:value-type="string">
                <text:p>Moderate (5–15%)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Decisive (&gt;15%)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Close (&lt;5%)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3.2$Windows_X86_64 LibreOffice_project/70e089b17412e4cb7773e41413306b17a2328c3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ignore" loext:external-data="ppt/embeddings/Microsoft_Excel_Worksheet4.xlsx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35cm" svg:stroke-color="#888888"/>
      <style:text-properties fo:color="#334155" style:text-position="0% 100%" fo:font-family="Arial" fo:font-size="12pt" style:font-size-asian="12pt" style:font-size-complex="12pt"/>
    </style:style>
    <style:style style:name="ch6" style:family="chart" style:data-style-name="N0">
      <style:chart-properties chart:display-label="true" chart:logarithmic="false" chart:interval-minor-divisor="5" chart:gap-width="50" chart:overlap="100" chart:reverse-direction="false" text:line-break="false" loext:try-staggering-first="false" chart:link-data-style-to-source="false" chart:axis-position="0" chart:axis-label-position="outside-start" chart:tick-mark-position="at-axis"/>
      <style:graphic-properties svg:stroke-width="0.035cm" svg:stroke-color="#888888"/>
      <style:text-properties fo:color="#334155" style:text-position="0% 100%" fo:font-family="Arial" fo:font-size="12pt" style:font-size-asian="12pt" style:font-size-complex="12pt"/>
    </style:style>
    <style:style style:name="ch7" style:family="chart">
      <style:graphic-properties svg:stroke-width="0.018cm" svg:stroke-color="#e2e8f0"/>
    </style:style>
    <style:style style:name="ch8" style:family="chart" style:data-style-name="N3">
      <style:chart-properties chart:link-data-style-to-source="false" chart:data-label-number="value" chart:data-label-text="false" chart:data-label-symbol="false" chart:data-label-series="false" chart:label-position="center" loext:custom-leader-lines="false">
        <chart:label-separator>
          <text:p>; </text:p>
        </chart:label-separator>
      </style:chart-properties>
      <style:graphic-properties draw:stroke="none" draw:fill-color="#ea580c" fo:wrap-option="wrap"/>
      <style:text-properties fo:color="#ffffff" style:text-position="0% 100%" fo:font-family="Arial" fo:font-size="11pt" style:font-size-asian="11pt" style:font-size-complex="11pt"/>
    </style:style>
    <style:style style:name="ch9" style:family="chart" style:data-style-name="N3">
      <style:chart-properties chart:link-data-style-to-source="false" chart:data-label-number="value" chart:data-label-text="false" chart:data-label-symbol="false" chart:data-label-series="false" chart:label-position="center" loext:custom-leader-lines="false">
        <chart:label-separator>
          <text:p>; </text:p>
        </chart:label-separator>
      </style:chart-properties>
      <style:graphic-properties draw:stroke="none" draw:fill-color="#dc2626" fo:wrap-option="wrap"/>
      <style:text-properties fo:color="#ffffff" style:text-position="0% 100%" fo:font-family="Arial" fo:font-size="11pt" style:font-size-asian="11pt" style:font-size-complex="11pt"/>
    </style:style>
    <style:style style:name="ch10" style:family="chart" style:data-style-name="N3">
      <style:chart-properties chart:link-data-style-to-source="false" chart:data-label-number="value" chart:data-label-text="false" chart:data-label-symbol="false" chart:data-label-series="false" chart:label-position="center" loext:custom-leader-lines="false">
        <chart:label-separator>
          <text:p>; </text:p>
        </chart:label-separator>
      </style:chart-properties>
      <style:graphic-properties draw:stroke="none" draw:fill-color="#1d4ed8" fo:wrap-option="wrap"/>
      <style:text-properties fo:color="#ffffff" style:text-position="0% 100%" fo:font-family="Arial" fo:font-size="11pt" style:font-size-asian="11pt" style:font-size-complex="11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334155" style:text-position="0% 100%" fo:font-family="Arial" fo:font-size="12pt" fo:language="en" fo:country="US" style:font-size-asian="12pt" style:font-size-complex="12pt"/>
    </style:style>
  </office:automatic-styles>
  <office:body>
    <office:chart>
      <chart:chart svg:width="14.732cm" svg:height="8.89cm" xlink:href="." xlink:type="simple" chart:class="chart:bar" chart:style-name="ch1">
        <chart:title svg:x="3.29cm" svg:y="0.312cm" chart:style-name="ch2">
          <text:p><text:span text:style-name="T1">TVK — Margin Breakdown (Flipped Seats)</text:span></text:p>
        </chart:title>
        <chart:legend chart:legend-position="bottom" svg:x="3.637cm" svg:y="8.37cm" style:legend-expansion="wide" chart:style-name="ch3"/>
        <chart:plot-area chart:style-name="ch4" svg:x="0.294cm" svg:y="1.21cm" svg:width="14.144cm" svg:height="6.799cm">
          <chart:coordinate-region svg:x="1.368cm" svg:y="1.21cm" svg:width="12.715cm" svg:height="6.083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 (&lt;5%)</text:p>
              </table:table-cell>
              <table:table-cell office:value-type="string">
                <text:p>Decisive (&gt;15%)</text:p>
              </table:table-cell>
              <table:table-cell office:value-type="string">
                <text:p>Moderate (5–15%)</text:p>
              </table:table-cell>
            </table:table-row>
          </table:table-header-rows>
          <table:table-rows>
            <table:table-row>
              <table:table-cell office:value-type="string">
                <text:p>TVK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3.2$Windows_X86_64 LibreOffice_project/70e089b17412e4cb7773e41413306b17a2328c34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